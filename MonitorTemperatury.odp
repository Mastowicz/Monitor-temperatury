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74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dfa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solid" svg:stroke-width="0.035cm" svg:stroke-color="#1a2744" draw:fill="solid" draw:fill-color="#1a27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0%" loext:shadow-blur="0.282cm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>
      <style:graphic-properties draw:stroke="solid" svg:stroke-width="0.035cm" svg:stroke-color="#2a4a7f" draw:fill="solid" draw:fill-color="#1e3a5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18%" loext:shadow-blur="0.212cm" loext:decorative="false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1a2744" draw:fill="solid" draw:fill-color="#5b9bd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ffffff" draw:fill="solid" draw:fill-color="#ffffff" draw:opacity="30%" draw:textarea-vertical-align="top" draw:auto-grow-height="false" fo:min-height="2.774cm" fo:min-width="2.548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35cm" svg:stroke-color="#1a2744" draw:fill="solid" draw:fill-color="#47b27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1a2744" draw:fill="solid" draw:fill-color="#e05c5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>
      <style:graphic-properties loext:decorative="false"/>
    </style:style>
    <style:style style:name="gr53" style:family="graphic" style:parent-style-name="standard">
      <style:graphic-properties draw:stroke="solid" svg:stroke-width="0.035cm" svg:stroke-color="#0d9488" draw:fill="solid" draw:fill-color="#ecfdf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0d9488" draw:fill="solid" draw:fill-color="#1e3a5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20%" loext:shadow-blur="0.282cm" loext:decorative="false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112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ro1" style:family="table-row">
      <style:table-row-properties style:row-height="1.016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e2e8f0" style:font-independent-line-spacing="true"/>
    </style:style>
    <style:style style:name="P1" style:family="paragraph">
      <loext:graphic-properties draw:fill="solid" draw:fill-color="#0d9488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1a2744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solid" draw:fill-color="#1e3a5f"/>
      <style:paragraph-properties fo:text-align="start"/>
      <style:text-properties fo:font-size="18pt"/>
    </style:style>
    <style:style style:name="P13" style:family="paragraph">
      <loext:graphic-properties draw:fill="solid" draw:fill-color="#5b9bd5"/>
      <style:paragraph-properties fo:text-align="start"/>
      <style:text-properties fo:font-size="18pt"/>
    </style:style>
    <style:style style:name="P14" style:family="paragraph">
      <loext:graphic-properties draw:fill="solid" draw:fill-color="#ffffff" draw:opacity="30%"/>
      <style:paragraph-properties fo:text-align="start"/>
      <style:text-properties fo:font-size="18pt"/>
    </style:style>
    <style:style style:name="P15" style:family="paragraph">
      <loext:graphic-properties draw:fill="solid" draw:fill-color="#47b27a"/>
      <style:paragraph-properties fo:text-align="start"/>
      <style:text-properties fo:font-size="18pt"/>
    </style:style>
    <style:style style:name="P16" style:family="paragraph">
      <loext:graphic-properties draw:fill="solid" draw:fill-color="#e05c5c"/>
      <style:paragraph-properties fo:text-align="start"/>
      <style:text-properties fo:font-size="18pt"/>
    </style:style>
    <style:style style:name="P17" style:family="paragraph">
      <loext:graphic-properties draw:fill="solid" draw:fill-color="#ecfdf5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44pt" fo:letter-spacing="normal" fo:language="en" fo:country="US" fo:font-style="normal" style:text-underline-style="none" fo:font-weight="bold" fo:background-color="transparent" style:font-name-asian="Cambria1" style:font-size-asian="44pt" style:font-style-asian="normal" style:font-weight-asian="bold" style:font-name-complex="Cambria" style:font-size-complex="44pt" style:font-style-complex="normal" style:font-weight-complex="bold"/>
    </style:style>
    <style:style style:name="T2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Calibri2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4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bold" fo:background-color="transparent" style:font-name-asian="Cambria1" style:font-size-asian="24pt" style:font-style-asian="normal" style:font-weight-asian="bold" style:font-name-complex="Cambria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mbria" fo:font-size="13pt" fo:letter-spacing="normal" fo:language="en" fo:country="US" fo:font-style="normal" style:text-underline-style="none" fo:font-weight="bold" fo:background-color="transparent" style:font-name-asian="Cambria1" style:font-size-asian="13pt" style:font-style-asian="normal" style:font-weight-asian="bold" style:font-name-complex="Cambria" style:font-size-complex="13pt" style:font-style-complex="normal" style:font-weight-complex="bold"/>
    </style:style>
    <style:style style:name="T12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3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bold" fo:background-color="transparent" style:font-name-asian="Cambria1" style:font-size-asian="32pt" style:font-style-asian="normal" style:font-weight-asian="bold" style:font-name-complex="Cambria" style:font-size-complex="32pt" style:font-style-complex="normal" style:font-weight-complex="bold"/>
    </style:style>
    <style:style style:name="T1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16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bold" fo:background-color="transparent" style:font-name-asian="Cambria1" style:font-size-asian="22pt" style:font-style-asian="normal" style:font-weight-asian="bold" style:font-name-complex="Cambria" style:font-size-complex="22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9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1" style:font-size-asian="16pt" style:font-style-asian="normal" style:font-weight-asian="bold" style:font-name-complex="Cambria" style:font-size-complex="16pt" style:font-style-complex="normal" style:font-weight-complex="bold"/>
    </style:style>
    <style:style style:name="T20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ambria" style:font-size-complex="36pt" style:font-style-complex="normal" style:font-weight-complex="bold"/>
    </style:style>
    <style:style style:name="T2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5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mbria" fo:font-size="16pt" fo:letter-spacing="normal" fo:language="en" fo:country="US" fo:font-style="italic" style:text-underline-style="none" fo:font-weight="normal" fo:background-color="transparent" style:font-name-asian="Cambria1" style:font-size-asian="16pt" style:font-style-asian="italic" style:font-weight-asian="normal" style:font-name-complex="Cambria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2e8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a27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f17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Shape 0" draw:style-name="gr1" draw:text-style-name="P1" draw:layer="layout" svg:width="0.456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2.859cm" svg:height="3.047cm" svg:x="1.27cm" svg:y="3.048cm">
          <text:p text:style-name="P2"><text:span text:style-name="T1">Monitor Temperatu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3" draw:layer="layout" svg:width="22.859cm" svg:height="1.523cm" svg:x="1.27cm" svg:y="6.35cm">
          <text:p text:style-name="P2"><text:span text:style-name="T2">Aplikacja mobilna zintegrowana z bazą da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8.889cm" svg:height="0.101cm" svg:x="1.27cm" svg:y="8.2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" draw:text-style-name="P3" draw:layer="layout" svg:width="22.859cm" svg:height="1.269cm" svg:x="1.27cm" svg:y="9.017cm">
          <text:p text:style-name="P2"><text:span text:style-name="T3">Patryk Wilk <text:s/></text:span><text:span text:style-name="T4">| Systemy Mobilne, sem. VI <text:s/>| <text:s/>Informatyka w przedsiębiorstw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3" draw:layer="layout" svg:width="22.859cm" svg:height="1.015cm" svg:x="1.27cm" svg:y="10.414cm">
          <text:p text:style-name="P2"><text:span text:style-name="T5">Małopolska Uczelnia Państwowa im. Rotmistrza Witolda Pileckiego w Oświęcimi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" draw:text-style-name="P5" draw:layer="layout" svg:width="3.809cm" svg:height="3.809cm" svg:x="20.828cm" svg:y="2.54cm">
          <text:p text:style-name="P4"><text:span text:style-name="T6">🌡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7">Przywitaj się, powiedz o czym będzie prezentacja: aplikacja Android monitorująca temperaturę z czujnika DHT11 przez ESP32 i MySQL.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er&gt;</text:page-number></text:span></text:p>
            </draw:text-box>
          </draw:frame>
        </presentation:notes>
      </draw:page>
      <draw:page draw:name="Slide 2" draw:style-name="dp3" draw:master-page-name="DEFAULT">
        <draw:custom-shape draw:name="Shape 0" draw:style-name="gr8" draw:text-style-name="P10" draw:layer="layout" svg:width="25.399cm" svg:height="2.15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3" draw:layer="layout" svg:width="23.367cm" svg:height="1.904cm" svg:x="1.016cm" svg:y="0.127cm">
          <text:p text:style-name="P2"><text:span text:style-name="T9">Cel projektu i architektura system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" draw:text-style-name="P11" draw:layer="layout" svg:width="5.333cm" svg:height="9.651cm" svg:x="0.762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3" draw:style-name="gr1" draw:text-style-name="P1" draw:layer="layout" svg:width="5.333cm" svg:height="1.396cm" svg:x="0.762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21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4" draw:style-name="gr1" draw:text-style-name="P1" draw:layer="layout" svg:width="5.333cm" svg:height="0.507cm" svg:x="0.762cm" svg:y="3.55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5" draw:layer="layout" svg:width="5.333cm" svg:height="1.777cm" svg:x="0.762cm" svg:y="4.191cm">
          <text:p text:style-name="P4"><text:span text:style-name="T10">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" draw:text-style-name="P5" draw:layer="layout" svg:width="4.825cm" svg:height="1.777cm" svg:x="1.016cm" svg:y="6.172cm">
          <text:p text:style-name="P4"><text:span text:style-name="T11">Warstwa sprzętow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5" draw:layer="layout" svg:width="4.825cm" svg:height="3.809cm" svg:x="1.016cm" svg:y="8.204cm">
          <text:p text:style-name="P4"><text:span text:style-name="T12">ESP32 WROOM</text:span></text:p>
          <text:p text:style-name="P4"><text:span text:style-name="T12">+ czujnik DHT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1" draw:layer="layout" svg:width="5.333cm" svg:height="9.651cm" svg:x="6.807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9" draw:style-name="gr1" draw:text-style-name="P1" draw:layer="layout" svg:width="5.333cm" svg:height="1.396cm" svg:x="6.807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21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0" draw:style-name="gr1" draw:text-style-name="P1" draw:layer="layout" svg:width="5.333cm" svg:height="0.507cm" svg:x="6.807cm" svg:y="3.55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" draw:text-style-name="P5" draw:layer="layout" svg:width="5.333cm" svg:height="1.777cm" svg:x="6.807cm" svg:y="4.191cm">
          <text:p text:style-name="P4"><text:span text:style-name="T10">🖥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" draw:text-style-name="P5" draw:layer="layout" svg:width="4.825cm" svg:height="1.777cm" svg:x="7.061cm" svg:y="6.172cm">
          <text:p text:style-name="P4"><text:span text:style-name="T11">Warstwa serwe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" draw:text-style-name="P5" draw:layer="layout" svg:width="4.825cm" svg:height="3.809cm" svg:x="7.061cm" svg:y="8.204cm">
          <text:p text:style-name="P4"><text:span text:style-name="T12">Spring Boot</text:span></text:p>
          <text:p text:style-name="P4"><text:span text:style-name="T12">REST API (JSO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1" draw:layer="layout" svg:width="5.333cm" svg:height="9.651cm" svg:x="12.852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5" draw:style-name="gr1" draw:text-style-name="P1" draw:layer="layout" svg:width="5.333cm" svg:height="1.396cm" svg:x="12.852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21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6" draw:style-name="gr1" draw:text-style-name="P1" draw:layer="layout" svg:width="5.333cm" svg:height="0.507cm" svg:x="12.852cm" svg:y="3.55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7" draw:text-style-name="P5" draw:layer="layout" svg:width="5.333cm" svg:height="1.777cm" svg:x="12.852cm" svg:y="4.191cm">
          <text:p text:style-name="P4"><text:span text:style-name="T10">🗄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8" draw:text-style-name="P5" draw:layer="layout" svg:width="4.825cm" svg:height="1.777cm" svg:x="13.106cm" svg:y="6.172cm">
          <text:p text:style-name="P4"><text:span text:style-name="T11">Warstwa bazy da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9" draw:text-style-name="P5" draw:layer="layout" svg:width="4.825cm" svg:height="3.809cm" svg:x="13.106cm" svg:y="8.204cm">
          <text:p text:style-name="P4"><text:span text:style-name="T12">MySQL (Docker)</text:span></text:p>
          <text:p text:style-name="P4"><text:span text:style-name="T12">Tabela: tempera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1" draw:layer="layout" svg:width="5.333cm" svg:height="9.651cm" svg:x="18.898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21" draw:style-name="gr1" draw:text-style-name="P1" draw:layer="layout" svg:width="5.333cm" svg:height="1.396cm" svg:x="18.898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21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22" draw:style-name="gr1" draw:text-style-name="P1" draw:layer="layout" svg:width="5.333cm" svg:height="0.507cm" svg:x="18.898cm" svg:y="3.55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0" draw:text-style-name="P5" draw:layer="layout" svg:width="5.333cm" svg:height="1.777cm" svg:x="18.898cm" svg:y="4.191cm">
          <text:p text:style-name="P4"><text:span text:style-name="T10">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1" draw:text-style-name="P5" draw:layer="layout" svg:width="4.825cm" svg:height="1.777cm" svg:x="19.152cm" svg:y="6.172cm">
          <text:p text:style-name="P4"><text:span text:style-name="T11">Aplikacja mobil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2" draw:text-style-name="P5" draw:layer="layout" svg:width="4.825cm" svg:height="3.809cm" svg:x="19.152cm" svg:y="8.204cm">
          <text:p text:style-name="P4"><text:span text:style-name="T12">Android 8+</text:span></text:p>
          <text:p text:style-name="P4"><text:span text:style-name="T12">Java, Retrof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3" draw:text-style-name="P5" draw:layer="layout" svg:width="1.015cm" svg:height="0.761cm" svg:x="5.969cm" svg:y="6.858cm">
          <text:p text:style-name="P4"><text:span text:style-name="T13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4" draw:text-style-name="P5" draw:layer="layout" svg:width="1.015cm" svg:height="0.761cm" svg:x="12.014cm" svg:y="6.858cm">
          <text:p text:style-name="P4"><text:span text:style-name="T13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5" draw:text-style-name="P5" draw:layer="layout" svg:width="1.015cm" svg:height="0.761cm" svg:x="18.059cm" svg:y="6.858cm">
          <text:p text:style-name="P4"><text:span text:style-name="T13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7">System oparty na architekturze warstwowej klient-serwer. Cztery główne warstwy komunikują się szeregowo: sprzęt → serwer → baza → aplikacja.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er&gt;</text:page-number></text:span></text:p>
            </draw:text-box>
          </draw:frame>
        </presentation:notes>
      </draw:page>
      <draw:page draw:name="Slide 3" draw:style-name="dp1" draw:master-page-name="DEFAULT">
        <draw:custom-shape draw:name="Text 0" draw:style-name="gr26" draw:text-style-name="P3" draw:layer="layout" svg:width="22.859cm" svg:height="2.031cm" svg:x="1.27cm" svg:y="0.635cm">
          <text:p text:style-name="P2"><text:span text:style-name="T14">Kluczowe funkcje aplikacj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3.809cm" svg:height="0.101cm" svg:x="1.27cm" svg:y="2.6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7" draw:text-style-name="P12" draw:layer="layout" svg:width="7.365cm" svg:height="4.444cm" svg:x="0.889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28" draw:text-style-name="P3" draw:layer="layout" svg:width="6.755cm" svg:height="1.142cm" svg:x="1.194cm" svg:y="3.607cm">
          <text:p text:style-name="P2"><text:span text:style-name="T15">🌡️ <text:s/>Aktualna tempera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9" draw:text-style-name="P3" draw:layer="layout" svg:width="6.755cm" svg:height="2.539cm" svg:x="1.194cm" svg:y="4.826cm">
          <text:p text:style-name="P2"><text:span text:style-name="T16">Ostatni rekord z bazy wyświetlany na dużym ekranie. Kolor tła zmienia się z temperaturą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12" draw:layer="layout" svg:width="7.365cm" svg:height="4.444cm" svg:x="8.89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6" draw:style-name="gr30" draw:text-style-name="P3" draw:layer="layout" svg:width="6.755cm" svg:height="1.142cm" svg:x="9.195cm" svg:y="3.607cm">
          <text:p text:style-name="P2"><text:span text:style-name="T15">📋 <text:s/>Dziennik pomiar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" draw:text-style-name="P3" draw:layer="layout" svg:width="6.755cm" svg:height="2.539cm" svg:x="9.195cm" svg:y="4.826cm">
          <text:p text:style-name="P2"><text:span text:style-name="T16">Dynamiczna lista historycznych odczytów: temperatura, godzina, dat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7" draw:text-style-name="P12" draw:layer="layout" svg:width="7.365cm" svg:height="4.444cm" svg:x="16.891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32" draw:text-style-name="P3" draw:layer="layout" svg:width="6.755cm" svg:height="1.142cm" svg:x="17.196cm" svg:y="3.607cm">
          <text:p text:style-name="P2"><text:span text:style-name="T15">🔄 <text:s/>Auto-odświeżanie co 10 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3" draw:text-style-name="P3" draw:layer="layout" svg:width="6.755cm" svg:height="2.539cm" svg:x="17.196cm" svg:y="4.826cm">
          <text:p text:style-name="P2"><text:span text:style-name="T16">Handler + Runnable aktywny tylko gdy aplikacja jest widoczna – oszczędność bateri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12" draw:layer="layout" svg:width="7.365cm" svg:height="4.444cm" svg:x="0.889cm" svg:y="8.255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34" draw:text-style-name="P3" draw:layer="layout" svg:width="6.755cm" svg:height="1.142cm" svg:x="1.194cm" svg:y="8.56cm">
          <text:p text:style-name="P2"><text:span text:style-name="T15">⚡ <text:s/>REST API (Retrofi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5" draw:text-style-name="P3" draw:layer="layout" svg:width="6.755cm" svg:height="2.539cm" svg:x="1.194cm" svg:y="9.779cm">
          <text:p text:style-name="P2"><text:span text:style-name="T16">Asynchroniczne pobieranie danych w formacie JSON bez blokowania 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7" draw:text-style-name="P12" draw:layer="layout" svg:width="7.365cm" svg:height="4.444cm" svg:x="8.89cm" svg:y="8.255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5" draw:style-name="gr36" draw:text-style-name="P3" draw:layer="layout" svg:width="6.755cm" svg:height="1.142cm" svg:x="9.195cm" svg:y="8.56cm">
          <text:p text:style-name="P2"><text:span text:style-name="T15">🔒 <text:s/>Wymagania jakościow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7" draw:text-style-name="P3" draw:layer="layout" svg:width="6.755cm" svg:height="2.539cm" svg:x="9.195cm" svg:y="9.779cm">
          <text:p text:style-name="P2"><text:span text:style-name="T16">Android 8+, czas odpowiedzi &lt;300 ms, szyfrowanie SSL/TLS, dostępność &gt;99%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7" draw:text-style-name="P12" draw:layer="layout" svg:width="7.365cm" svg:height="4.444cm" svg:x="16.891cm" svg:y="8.255cm">
          <text:p/>
          <draw:enhanced-geometry draw:mirror-horizontal="false" draw:mirror-vertical="false" draw:glue-points="?f8 0 0 ?f9 ?f8 ?f10 ?f11 ?f9" draw:text-areas="?f5 ?f5 ?f6 ?f7" svg:viewBox="0 0 0 0" draw:type="ooxml-roundRect" draw:modifiers="5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8" draw:style-name="gr38" draw:text-style-name="P3" draw:layer="layout" svg:width="6.755cm" svg:height="1.142cm" svg:x="17.196cm" svg:y="8.56cm">
          <text:p text:style-name="P2"><text:span text:style-name="T15">🐳 <text:s/>Stack technologicz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9" draw:text-style-name="P3" draw:layer="layout" svg:width="6.755cm" svg:height="2.539cm" svg:x="17.196cm" svg:y="9.779cm">
          <text:p text:style-name="P2"><text:span text:style-name="T16">Android Studio · Java · Spring Boot · MySQL · Docker · Retrofi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7">Omów pokrótce każdą funkcję. Zwróć uwagę na inteligentne odświeżanie – Handler pauzuje gdy aplikacja jest w tle.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er&gt;</text:page-number></text:span></text:p>
            </draw:text-box>
          </draw:frame>
        </presentation:notes>
      </draw:page>
      <draw:page draw:name="Slide 4" draw:style-name="dp3" draw:master-page-name="DEFAULT">
        <draw:custom-shape draw:name="Shape 0" draw:style-name="gr8" draw:text-style-name="P10" draw:layer="layout" svg:width="25.399cm" svg:height="2.15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3" draw:layer="layout" svg:width="23.367cm" svg:height="1.904cm" svg:x="1.016cm" svg:y="0.127cm">
          <text:p text:style-name="P2"><text:span text:style-name="T9">Demo interfejsu &amp; Wyniki test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1" draw:text-style-name="P13" draw:layer="layout" svg:width="3.555cm" svg:height="7.619cm" svg:x="0.762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10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42" draw:text-style-name="P5" draw:layer="layout" svg:width="3.555cm" svg:height="1.777cm" svg:x="0.762cm" svg:y="4.191cm">
          <text:p text:style-name="P4"><text:span text:style-name="T17">-1°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3" draw:text-style-name="P5" draw:layer="layout" svg:width="3.555cm" svg:height="1.396cm" svg:x="0.762cm" svg:y="2.921cm">
          <text:p text:style-name="P4"><text:span text:style-name="T18">Aktualna</text:span></text:p>
          <text:p text:style-name="P4"><text:span text:style-name="T18">tempera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4" draw:text-style-name="P14" draw:layer="layout" svg:width="3.047cm" svg:height="3.023cm" svg:x="1.016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5" draw:text-style-name="P15" draw:layer="layout" svg:width="3.555cm" svg:height="7.619cm" svg:x="4.826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10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46" draw:text-style-name="P5" draw:layer="layout" svg:width="3.555cm" svg:height="1.777cm" svg:x="4.826cm" svg:y="4.191cm">
          <text:p text:style-name="P4"><text:span text:style-name="T17">17°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7" draw:text-style-name="P5" draw:layer="layout" svg:width="3.555cm" svg:height="1.396cm" svg:x="4.826cm" svg:y="2.921cm">
          <text:p text:style-name="P4"><text:span text:style-name="T18">Aktualna</text:span></text:p>
          <text:p text:style-name="P4"><text:span text:style-name="T18">tempera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4" draw:text-style-name="P14" draw:layer="layout" svg:width="3.047cm" svg:height="3.023cm" svg:x="5.08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8" draw:text-style-name="P16" draw:layer="layout" svg:width="3.555cm" svg:height="7.619cm" svg:x="8.89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10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5" draw:style-name="gr49" draw:text-style-name="P5" draw:layer="layout" svg:width="3.555cm" svg:height="1.777cm" svg:x="8.89cm" svg:y="4.191cm">
          <text:p text:style-name="P4"><text:span text:style-name="T17">32°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5" draw:layer="layout" svg:width="3.555cm" svg:height="1.396cm" svg:x="8.89cm" svg:y="2.921cm">
          <text:p text:style-name="P4"><text:span text:style-name="T18">Aktualna</text:span></text:p>
          <text:p text:style-name="P4"><text:span text:style-name="T18">tempera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4" draw:text-style-name="P14" draw:layer="layout" svg:width="3.047cm" svg:height="3.023cm" svg:x="9.144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" draw:layer="layout" svg:width="11.683cm" svg:height="1.142cm" svg:x="12.954cm" svg:y="2.667cm">
          <text:p text:style-name="P2"><text:span text:style-name="T19">Wyniki testów funkcjona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2" draw:layer="layout" svg:width="11.683cm" svg:height="6.095cm" svg:x="12.954cm" svg:y="3.93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0">Test</text:span></text:p>
              </table:table-cell>
              <table:table-cell>
                <text:p text:style-name="P2"><text:span text:style-name="T20">Wynik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0">Połączenie z API (JSON)</text:span></text:p>
              </table:table-cell>
              <table:table-cell>
                <text:p text:style-name="P2"><text:span text:style-name="T20">✅ Pozytywn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0">Aktualna temperatura</text:span></text:p>
              </table:table-cell>
              <table:table-cell>
                <text:p text:style-name="P2"><text:span text:style-name="T20">✅ Pozytywn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0">Dziennik pomiarów</text:span></text:p>
              </table:table-cell>
              <table:table-cell>
                <text:p text:style-name="P2"><text:span text:style-name="T20">✅ Pozytywn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0">Android 8 / 10 / 13</text:span></text:p>
              </table:table-cell>
              <table:table-cell>
                <text:p text:style-name="P2"><text:span text:style-name="T20">✅ Kompatybiln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0">Czas odpowiedzi API</text:span></text:p>
              </table:table-cell>
              <table:table-cell>
                <text:p text:style-name="P2"><text:span text:style-name="T20">✅ Akceptowaln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21" draw:style-name="gr53" draw:text-style-name="P17" draw:layer="layout" svg:width="11.683cm" svg:height="3.047cm" svg:x="12.954cm" svg:y="10.287cm">
          <text:p/>
          <draw:enhanced-geometry draw:mirror-horizontal="false" draw:mirror-vertical="false" draw:glue-points="?f8 0 0 ?f9 ?f8 ?f10 ?f11 ?f9" draw:text-areas="?f5 ?f5 ?f6 ?f7" svg:viewBox="0 0 0 0" draw:type="ooxml-roundRect" draw:modifiers="8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2" draw:style-name="gr54" draw:text-style-name="P3" draw:layer="layout" svg:width="10.921cm" svg:height="2.793cm" svg:x="13.335cm" svg:y="10.414cm">
          <text:p text:style-name="P2"><text:span text:style-name="T21">Testy niefunkcjonalne: aplikacja działa płynnie na Android 8/10/13, odświeżanie co 10 s nie blokuje UI, zapis i odczyt z bazy MySQL przebiegają prawidłow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7">Pokaż screenshoty. Trzy tryby kolorystyczne: zimno (niebieski), umiarkowanie (zielony), gorąco (czerwony). Wszystkie testy zaliczone pozytywnie.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er&gt;</text:page-number></text:span></text:p>
            </draw:text-box>
          </draw:frame>
        </presentation:notes>
      </draw:page>
      <draw:page draw:name="Slide 5" draw:style-name="dp1" draw:master-page-name="DEFAULT">
        <draw:custom-shape draw:name="Text 0" draw:style-name="gr55" draw:text-style-name="P3" draw:layer="layout" svg:width="22.859cm" svg:height="2.031cm" svg:x="1.27cm" svg:y="0.762cm">
          <text:p text:style-name="P2"><text:span text:style-name="T22">Podsumowan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5.079cm" svg:height="0.126cm" svg:x="1.27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6" draw:text-style-name="P3" draw:layer="layout" svg:width="11.429cm" svg:height="1.015cm" svg:x="1.27cm" svg:y="3.302cm">
          <text:p text:style-name="P2"><text:span text:style-name="T23">Co zostało zrealizowane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7" draw:text-style-name="P3" draw:layer="layout" svg:width="11.175cm" svg:height="1.269cm" svg:x="1.27cm" svg:y="4.445cm">
          <text:p text:style-name="P2"><text:span text:style-name="T24">✅ <text:s/>Aplikacja Android odczytuje temperaturę z MySQL przez REST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8" draw:text-style-name="P3" draw:layer="layout" svg:width="11.175cm" svg:height="1.269cm" svg:x="1.27cm" svg:y="5.842cm">
          <text:p text:style-name="P2"><text:span text:style-name="T24">✅ <text:s/>Automatyczne odświeżanie co 10 s (inteligentne wstrzymywani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9" draw:text-style-name="P3" draw:layer="layout" svg:width="11.175cm" svg:height="1.269cm" svg:x="1.27cm" svg:y="7.239cm">
          <text:p text:style-name="P2"><text:span text:style-name="T24">✅ <text:s/>Dynamiczny UI reagujący na wartość temperatu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0" draw:text-style-name="P3" draw:layer="layout" svg:width="11.175cm" svg:height="1.269cm" svg:x="1.27cm" svg:y="8.636cm">
          <text:p text:style-name="P2"><text:span text:style-name="T24">✅ <text:s/>Pełna dokumentacja i testy funkcjonalne/niefunkcjonal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1" draw:text-style-name="P12" draw:layer="layout" svg:width="10.667cm" svg:height="9.143cm" svg:x="13.716cm" svg:y="3.048cm">
          <text:p/>
          <draw:enhanced-geometry draw:mirror-horizontal="false" draw:mirror-vertical="false" draw:glue-points="?f8 0 0 ?f9 ?f8 ?f10 ?f11 ?f9" draw:text-areas="?f5 ?f5 ?f6 ?f7" svg:viewBox="0 0 0 0" draw:type="ooxml-roundRect" draw:modifiers="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62" draw:text-style-name="P3" draw:layer="layout" svg:width="9.651cm" svg:height="1.142cm" svg:x="14.224cm" svg:y="3.429cm">
          <text:p text:style-name="P2"><text:span text:style-name="T23">Możliwe rozszerzenia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3" draw:text-style-name="P3" draw:layer="layout" svg:width="9.651cm" svg:height="1.269cm" svg:x="14.224cm" svg:y="4.826cm">
          <text:p text:style-name="P2"><text:span text:style-name="T25">📈 <text:s/>Wykresy historii temperatu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4" draw:text-style-name="P3" draw:layer="layout" svg:width="9.651cm" svg:height="1.269cm" svg:x="14.224cm" svg:y="6.35cm">
          <text:p text:style-name="P2"><text:span text:style-name="T25">🔔 <text:s/>Powiadomienia push przy przekroczeniu prog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5" draw:text-style-name="P3" draw:layer="layout" svg:width="9.651cm" svg:height="1.269cm" svg:x="14.224cm" svg:y="7.874cm">
          <text:p text:style-name="P2"><text:span text:style-name="T25">🎨 <text:s/>Bardziej rozbudowany interfejs wizual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6" draw:text-style-name="P3" draw:layer="layout" svg:width="9.651cm" svg:height="1.269cm" svg:x="14.224cm" svg:y="9.398cm">
          <text:p text:style-name="P2"><text:span text:style-name="T25">🏠 <text:s/>Szablon dla innych typów danych Io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7" draw:text-style-name="P5" draw:layer="layout" svg:width="22.859cm" svg:height="1.142cm" svg:x="1.27cm" svg:y="12.7cm">
          <text:p text:style-name="P4"><text:span text:style-name="T26">Dziękuję za uwagę – pytania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7">Podsumuj: system działa end-to-end. Projekt może służyć jako szablon do innych aplikacji IoT. Zaproś do pytań.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Monitor Temperatury – Aplikacja Mobilna</dc:title>
    <dc:subject>PptxGenJS Presentation</dc:subject>
    <meta:initial-creator>PptxGenJS</meta:initial-creator>
    <meta:editing-cycles>2</meta:editing-cycles>
    <meta:creation-date>2026-06-10T10:42:00</meta:creation-date>
    <dc:date>2026-06-10T14:24:59.667338000</dc:date>
    <meta:editing-duration>PT4M26S</meta:editing-duration>
    <meta:generator>LibreOffice/25.8.6.2$Windows_X86_64 LibreOffice_project/b4b39682cd9868fa725bc664aff94278d315bd04</meta:generator>
    <meta:document-statistic meta:object-count="121"/>
    <meta:user-defined meta:name="AppVersion">16.0000</meta:user-defined>
    <meta:user-defined meta:name="Company">PptxGenJS</meta:user-defined>
    <meta:user-defined meta:name="Notes" meta:value-type="float">5</meta:user-defined>
    <meta:user-defined meta:name="PresentationFormat">On-screen Show (16:9)</meta:user-defined>
    <meta:user-defined meta:name="Slides" meta:value-type="float">5</meta:user-defined>
  </office:meta>
</office:document-meta>
</file>